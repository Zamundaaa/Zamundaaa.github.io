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160mm" svg:height="89.98mm" svg:x="0.76mm" svg:y="33.97mm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01mm" svg:height="89.97mm" svg:x="162.94mm" svg:y="34.67mm">
            <draw:object draw:notify-on-update-of-ranges="Sheet1.I2:Sheet1.I7 Sheet1.J1:Sheet1.J1 Sheet1.J2:Sheet1.J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24.92mm" svg:y="34.87mm">
            <draw:object draw:notify-on-update-of-ranges="Sheet1.P1:Sheet1.P1 Sheet1.P2:Sheet1.P7 Sheet1.Q1:Sheet1.Q1 Sheet1.Q2:Sheet1.Q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Brightness</text:p>
          </table:table-cell>
          <table:table-cell office:value-type="string" calcext:value-type="string">
            <text:p>Sensor Value</text:p>
          </table:table-cell>
          <table:table-cell table:number-columns-repeated="6"/>
          <table:table-cell office:value-type="string" calcext:value-type="string">
            <text:p>Brightness</text:p>
          </table:table-cell>
          <table:table-cell office:value-type="string" calcext:value-type="string">
            <text:p>Sensor Value</text:p>
          </table:table-cell>
          <table:table-cell table:number-columns-repeated="5"/>
          <table:table-cell office:value-type="string" calcext:value-type="string">
            <text:p>Brightness</text:p>
          </table:table-cell>
          <table:table-cell office:value-type="string" calcext:value-type="string">
            <text:p>Sensor 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8.3693181818182" calcext:value-type="float">
            <text:p>-18.3693181818182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.94999999999999" calcext:value-type="float">
            <text:p>-7.94999999999999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.94999999999999" calcext:value-type="float">
            <text:p>-6.94999999999999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.05" calcext:value-type="float">
            <text:p>30.05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4.775" calcext:value-type="float">
            <text:p>164.775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1.675" calcext:value-type="float">
            <text:p>181.675</text:p>
          </table:table-cell>
          <table:table-cell table:number-columns-repeated="6"/>
          <table:table-cell table:number-columns-repeated="2"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20:56:17.924831843</meta:creation-date>
    <dc:date>2026-04-24T21:38:29.166572205</dc:date>
    <meta:editing-duration>PT31M52S</meta:editing-duration>
    <meta:editing-cycles>1</meta:editing-cycles>
    <meta:document-statistic meta:table-count="1" meta:cell-count="42" meta:object-count="3"/>
    <meta:generator>LibreOffice/26.2.2.2$Linux_X86_64 LibreOffice_project/6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99cm" xlink:href=".." xlink:type="simple" chart:class="chart:scatter" chart:style-name="ch1">
        <chart:legend chart:legend-position="end" svg:x="12.512cm" svg:y="4.2cm" style:legend-expansion="high" chart:style-name="ch2"/>
        <chart:plot-area chart:style-name="ch3" svg:x="0.32cm" svg:y="0.179cm" svg:width="11.872cm" svg:height="8.641cm">
          <chart:coordinate-region svg:x="1.167cm" svg:y="0.378cm" svg:width="10.725cm" svg:height="8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or 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7</svg:desc>
                </draw:g>
              </table:table-cell>
              <table:table-cell office:value-type="float" office:value="-18.3693181818182">
                <text:p>-18.3693181818182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-7.94999999999999">
                <text:p>-7.94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-6.94999999999999">
                <text:p>-6.94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64.775">
                <text:p>164.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81.675">
                <text:p>181.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98cm" xlink:href=".." xlink:type="simple" chart:class="chart:scatter" chart:style-name="ch1">
        <chart:legend chart:legend-position="end" svg:x="12.513cm" svg:y="4.2cm" style:legend-expansion="high" chart:style-name="ch2"/>
        <chart:plot-area chart:style-name="ch3" svg:x="0.32cm" svg:y="0.179cm" svg:width="11.873cm" svg:height="8.64cm">
          <chart:coordinate-region svg:x="1.167cm" svg:y="0.378cm" svg:width="10.72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7" chart:label-cell-address="Sheet1.J1:Sheet1.J1" chart:class="chart:scatter">
            <chart:domain table:cell-range-address="Sheet1.I2:Sheet1.I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ensor Valu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2:Sheet1.I7</svg:desc>
                </draw:g>
              </table:table-cell>
              <table:table-cell office:value-type="float" office:value="0">
                <text:p>0</text:p>
                <draw:g>
                  <svg:desc>Sheet1.J2:Sheet1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11cm" svg:y="4.201cm" style:legend-expansion="high" chart:style-name="ch2"/>
        <chart:plot-area chart:style-name="ch3" svg:x="0.32cm" svg:y="0.18cm" svg:width="11.871cm" svg:height="8.64cm">
          <chart:coordinate-region svg:x="1.167cm" svg:y="0.379cm" svg:width="10.72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2:Sheet1.Q7" chart:label-cell-address="Sheet1.Q1:Sheet1.Q1" chart:class="chart:scatter">
            <chart:domain table:cell-range-address="Sheet1.P2:Sheet1.P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Sensor Value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P2:Sheet1.P7</svg:desc>
                </draw:g>
              </table:table-cell>
              <table:table-cell office:value-type="float" office:value="0">
                <text:p>0</text:p>
                <draw:g>
                  <svg:desc>Sheet1.Q2:Sheet1.Q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21">
                <text:p>1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